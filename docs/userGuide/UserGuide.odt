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0000000258FDC09AC9.png" manifest:media-type="image/png"/>
  <manifest:file-entry manifest:full-path="Pictures/10000000000004000000025898709D02.png" manifest:media-type="image/png"/>
  <manifest:file-entry manifest:full-path="Pictures/10000000000004000000025865B11B08.png" manifest:media-type="image/png"/>
  <manifest:file-entry manifest:full-path="Pictures/1000000000000400000002585ACD45C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resiasScreenfont" svg:font-family="TiresiasScreenfont" style:font-pitch="variable"/>
    <style:font-face style:name="TiresiasScreenfont1" svg:font-family="TiresiasScreenfont" style:font-adornments="Bold" style:font-pitch="variable"/>
    <style:font-face style:name="TiresiasScreenfont3" svg:font-family="TiresiasScreenfont" style:font-adornments="Italic" style:font-pitch="variable"/>
    <style:font-face style:name="TiresiasScreenfont2" svg:font-family="TiresiasScreenfont"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ing">
      <style:paragraph-properties fo:text-align="center" style:justify-single-word="false"/>
      <style:text-properties style:font-name="TiresiasScreenfont" fo:font-size="32pt" fo:font-weight="bold" style:font-size-asian="32pt" style:font-weight-asian="bold" style:font-size-complex="32pt" style:font-weight-complex="bold"/>
    </style:style>
    <style:style style:name="P2" style:family="paragraph" style:parent-style-name="Text_20_body">
      <style:text-properties style:font-name="TiresiasScreenfont"/>
    </style:style>
    <style:style style:name="P3" style:family="paragraph" style:parent-style-name="Text_20_body">
      <style:text-properties fo:font-size="12pt" fo:font-weight="normal" style:font-size-asian="10.5pt" style:font-weight-asian="normal" style:font-size-complex="12pt" style:font-weight-complex="normal"/>
    </style:style>
    <style:style style:name="P4" style:family="paragraph" style:parent-style-name="Footer">
      <style:text-properties style:font-name="TiresiasScreenfont"/>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Heading_20_1">
      <style:paragraph-properties fo:break-before="page"/>
      <style:text-properties fo:font-size="16.1000003814697pt" style:font-size-asian="16.1000003814697pt" style:font-size-complex="16.1000003814697pt"/>
    </style:style>
    <style:style style:name="P7" style:family="paragraph" style:parent-style-name="Heading_20_2">
      <style:text-properties fo:font-style="normal" style:font-style-asian="normal" style:font-style-complex="normal"/>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TiresiasScreenfont"/>
    </style:style>
    <style:style style:name="T2" style:family="text">
      <style:text-properties style:font-name="TiresiasScreenfont" fo:font-size="26pt" fo:font-weight="bold" style:font-size-asian="26pt" style:font-weight-asian="bold" style:font-size-complex="26pt" style:font-weight-complex="bold"/>
    </style:style>
    <style:style style:name="T3" style:family="text">
      <style:text-properties style:font-name="TiresiasScreenfont" fo:font-weight="bold" style:font-weight-asian="bold" style:font-weight-complex="bold"/>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variable-decls>
        <text:variable-decl office:value-type="float"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1"><text:bookmark-start text:name="__RefHeading__105_644531775"/>AldatesX User Guide<text:bookmark-end text:name="__RefHeading__105_644531775"/></text:p>
      <text:p text:style-name="P1">v<text:variable-set text:name="version" office:value-type="float" office:value="0.3" style:data-style-name="N0">0.3</text:variable-se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text:a xlink:type="simple" xlink:href="#__RefHeading__144_644531775" text:style-name="Index_20_Link" text:visited-style-name="Index_20_Link">Introduction<text:tab/>2</text:a></text:p>
          <text:p text:style-name="P5"><text:a xlink:type="simple" xlink:href="#__RefHeading__146_644531775" text:style-name="Index_20_Link" text:visited-style-name="Index_20_Link">The Main Screen<text:tab/>2</text:a></text:p>
          <text:p text:style-name="P5"><text:a xlink:type="simple" xlink:href="#__RefHeading__148_644531775" text:style-name="Index_20_Link" text:visited-style-name="Index_20_Link">Camera Control<text:tab/>3</text:a></text:p>
          <text:p text:style-name="P8"><text:a xlink:type="simple" xlink:href="#__RefHeading__210_644531775" text:style-name="Index_20_Link" text:visited-style-name="Index_20_Link">Advanced Camera Controls<text:tab/>3</text:a></text:p>
          <text:p text:style-name="P5"><text:a xlink:type="simple" xlink:href="#__RefHeading__212_644531775" text:style-name="Index_20_Link" text:visited-style-name="Index_20_Link">Extras<text:tab/>3</text:a></text:p>
          <text:p text:style-name="P5"><text:a xlink:type="simple" xlink:href="#__RefHeading__214_644531775" text:style-name="Index_20_Link" text:visited-style-name="Index_20_Link">System Power<text:tab/>5</text:a></text:p>
          <text:p text:style-name="P5"><text:a xlink:type="simple" xlink:href="#__RefHeading__216_644531775" text:style-name="Index_20_Link" text:visited-style-name="Index_20_Link">System Log<text:tab/>5</text:a></text:p>
        </text:index-body>
      </text:table-of-content>
      <text:p text:style-name="P2"/>
      <text:h text:style-name="P6" text:outline-level="1"><text:bookmark-start text:name="__RefHeading__144_644531775"/><text:span text:style-name="T3">Introduction</text:span><text:bookmark-end text:name="__RefHeading__144_644531775"/></text:h>
      <text:p text:style-name="P3"><text:span text:style-name="T1">AldatesX is a control system for audio/visual equipment such as video switchers and mixers. It's designed around a touchscreen interface to send commands via a controller machine to various pieces of equipment.</text:span></text:p>
      <text:h text:style-name="Heading_20_1" text:outline-level="1"><text:bookmark-start text:name="__RefHeading__146_644531775"/><text:span text:style-name="T1">The Main Screen</text:span><text:bookmark-end text:name="__RefHeading__146_644531775"/></text:h>
      <text:p text:style-name="Text_20_body"><text:span text:style-name="T1">The main interface screen for AldatesX consists of a row of input-selection buttons along the top, a grid of output-selection buttons on the right, a toolbar along the bottom and a central area which shows device-specific controls (for example, if a camera is selected, it will show camera controls).</text:span></text:p>
      <text:p text:style-name="Text_20_body"><draw:frame draw:style-name="fr1" draw:name="Frame1" text:anchor-type="paragraph" svg:width="17cm" draw:z-index="0"><draw:text-box fo:min-height="10.349cm"><text:p text:style-name="Image"><draw:frame draw:style-name="fr4" draw:name="graphics1" text:anchor-type="paragraph" svg:x="0.004cm" svg:y="0.002cm" svg:width="17cm" style:rel-width="100%" svg:height="10.349cm" style:rel-height="scale" draw:z-index="1"><draw:image xlink:href="Pictures/10000000000004000000025865B11B08.png" xlink:type="simple" xlink:show="embed" xlink:actuate="onLoad"/></draw:frame>Image <text:sequence text:ref-name="refImage0" text:name="Image" text:formula="ooow:Image+1" style:num-format="1">1</text:sequence>: Main screen, showing camera controls</text:p></draw:text-box></draw:frame><text:span text:style-name="T1"/></text:p>
      <text:p text:style-name="P3"><text:span text:style-name="T1">Pressing an input button will display that input on the preview monitor, and will display the relevant controls in the central area of the main screen. (If there are no relevant controls for a given input, the text “No controllable device” will be displayed.) It is also possible to select inputs using the number keys 0-6 on a keyboard, if one is connected. (0 is the selection for 'Blank'.)</text:span></text:p>
      <text:p text:style-name="P3"><text:span text:style-name="T1">With an input selected, pressing one of the output buttons on the right will display that input on the chosen output. Selecting “PC Mix” will display the input behind the main visuals PC output (e.g. behind song words). This can be previewed by pressing the “PC Mix” input. Selecting “All”, or pressing the spacebar, will display the input on all outputs except PC Mix.</text:span></text:p>
      <text:p text:style-name="P3"><text:soft-page-break/><text:span text:style-name="T1">Note that it does not make sense to send Visuals PC to PC Mix, and nothing will happen should you attempt to do so!</text:span></text:p>
      <text:h text:style-name="Heading_20_1" text:outline-level="1"><text:bookmark-start text:name="__RefHeading__148_644531775"/><text:span text:style-name="T1">Camera Control</text:span><text:bookmark-end text:name="__RefHeading__148_644531775"/></text:h>
      <text:p text:style-name="P3"><text:span text:style-name="T1">There are three cameras in the system: two located on pillars in church, and one in the welcome area by the font. Selecting a camera input will display the camera controls, as shown in </text:span><text:span text:style-name="T1"><text:sequence-ref text:reference-format="category-and-value" text:ref-name="refImage0">Image 1</text:sequence-ref></text:span><text:span text:style-name="T1">. </text:span></text:p>
      <text:p text:style-name="P3"><text:span text:style-name="T1">You can move the camera up, down, left and right by pressing the arrow buttons. It is also possible to move the cameras with the cursor keys if a keyboard is connected. You may also zoom and focus the cameras with the labelled controls. Pressing “Auto” will tell the camera to automatically focus, and it will remain in auto-focus mode until the focus+ or focus- buttons are pressed.</text:span></text:p>
      <text:p text:style-name="P3"><text:span text:style-name="T1">Backlight compensation can be toggled on or off with the Brightness+/- buttons. This is useful when the subject is against a bright background; other areas of the image might become overexposed.</text:span></text:p>
      <text:p text:style-name="P3"><text:span text:style-name="T1">Each camera has six presets available. You can store the current position, zoom and focus of a camera by pressing one of the six “Set” buttons. You can then later move the camera back to those settings by pressing the relevant number button. Presets are lost when the system is turned off.</text:span></text:p>
      <text:h text:style-name="P7" text:outline-level="2"><text:bookmark-start text:name="__RefHeading__210_644531775"/><text:span text:style-name="T1">Advanced Camera Controls</text:span><text:bookmark-end text:name="__RefHeading__210_644531775"/></text:h>
      <text:p text:style-name="P3"><text:span text:style-name="T1">Advanced camera controls are available by long-pressing the camera input selection buttons. The advanced controls allow you to read the exact pan, tilt and zoom values from the camera. Further controls will be added in future releases.</text:span></text:p>
      <text:p text:style-name="P3"><text:span text:style-name="T1">Press Back to exit the advanced controls screen.</text:span></text:p>
      <text:h text:style-name="Heading_20_1" text:outline-level="1"><text:bookmark-start text:name="__RefHeading__212_644531775"/><text:span text:style-name="T1">Extras</text:span><text:bookmark-end text:name="__RefHeading__212_644531775"/></text:h>
      <text:p text:style-name="P3"><text:span text:style-name="T1">It is possible to connect extra inputs to the system. These can be accessed via the “Extras” screen, shown in </text:span><text:span text:style-name="T1"><text:sequence-ref text:reference-format="category-and-value" text:ref-name="refImage1">Image 2</text:sequence-ref></text:span><text:span text:style-name="T1"> on page </text:span><text:span text:style-name="T1"><text:sequence-ref text:reference-format="page" text:ref-name="refImage1">4</text:sequence-ref></text:span><text:span text:style-name="T1">.</text:span></text:p>
      <text:p text:style-name="P3"><text:span text:style-name="T1">The inputs “Extras 1” through “4” are on the front of the video patch bay. The second graphics output from the visuals PC is also available on this screen.</text:span></text:p>
      <text:p text:style-name="P3"><text:span text:style-name="T1">To preview an extra input, select it and press the “Preview / PC Mix” button. Note that it is not possible to preview an extra input without also sending it to PC Mix, and vice versa.</text:span></text:p>
      <text:p text:style-name="P3"><text:span text:style-name="T1">To display an extra input on an output, select it and press the desired output, as with the usual inputs. This includes PC Mix (selecting this will also change the preview screen if a different input is currently being previewed).</text:span></text:p>
      <text:p text:style-name="P3"><draw:frame draw:style-name="fr2" draw:name="Frame2" text:anchor-type="paragraph" svg:x="0.159cm" svg:y="0.035cm" svg:width="17cm" draw:z-index="2"><draw:text-box fo:min-height="10.349cm"><text:p text:style-name="Image"><draw:frame draw:style-name="fr4" draw:name="graphics2" text:anchor-type="paragraph" svg:x="0.004cm" svg:y="0.002cm" svg:width="17cm" style:rel-width="100%" svg:height="10.349cm" style:rel-height="scale" draw:z-index="3"><draw:image xlink:href="Pictures/10000000000004000000025898709D02.png" xlink:type="simple" xlink:show="embed" xlink:actuate="onLoad"/></draw:frame>Image <text:sequence text:ref-name="refImage1" text:name="Image" text:formula="ooow:Image+1" style:num-format="1">2</text:sequence>: Extras screen</text:p></draw:text-box></draw:frame><draw:frame draw:style-name="fr2" draw:name="Frame3" text:anchor-type="paragraph" svg:x="0.238cm" svg:y="13.901cm" svg:width="17cm" draw:z-index="4"><draw:text-box fo:min-height="10.349cm"><text:p text:style-name="Image"><draw:frame draw:style-name="fr4" draw:name="graphics3" text:anchor-type="paragraph" svg:x="0.004cm" svg:y="0.002cm" svg:width="17cm" style:rel-width="100%" svg:height="10.349cm" style:rel-height="scale" draw:z-index="5"><draw:image xlink:href="Pictures/1000000000000400000002585ACD45C0.png" xlink:type="simple" xlink:show="embed" xlink:actuate="onLoad"/></draw:frame>Image <text:sequence text:ref-name="refImage2" text:name="Image" text:formula="ooow:Image+1" style:num-format="1">3</text:sequence>: System Power screen</text:p></draw:text-box></draw:frame><text:soft-page-break/><text:span text:style-name="T1">You can also control some functions of the “Extras” scan converter: pressing “Overscan” will toggle the overscan mode on and off, expanding the picture to fill the screen. Pressing “Freeze” will freeze the video until it is pressed a second time. (This applies only to the “Visuals PC video” input, not Extras 1-4.)</text:span></text:p>
      <text:h text:style-name="Heading_20_1" text:outline-level="1"><text:bookmark-start text:name="__RefHeading__214_644531775"/><text:soft-page-break/><text:span text:style-name="T1">System Power</text:span><text:bookmark-end text:name="__RefHeading__214_644531775"/></text:h>
      <text:p text:style-name="P3"><text:span text:style-name="T1">The main system power can be turned on and off through the System Power screen (</text:span><text:span text:style-name="T1"><text:sequence-ref text:reference-format="category-and-value" text:ref-name="refImage2">Image 3</text:sequence-ref></text:span><text:span text:style-name="T1"> on page </text:span><text:span text:style-name="T1"><text:sequence-ref text:reference-format="page" text:ref-name="refImage2">4</text:sequence-ref></text:span><text:span text:style-name="T1">), which is displayed by pressing “System Power” in the bottom toolbar.</text:span></text:p>
      <text:p text:style-name="P3"><text:span text:style-name="T1">Pressing “On” will begin a timed sequence to switch the system on. There will not currently be any feedback that this process has started, but after 20-30 seconds the system should be powered up fully.</text:span></text:p>
      <text:p text:style-name="P3"><text:span text:style-name="T1">Likewise, pressing “Off” will begin a timed sequence to turn the system off. Again, there is no feedback that this process is underway, but after 20-30 seconds the system will be powered off.</text:span></text:p>
      <text:p text:style-name="P3"><text:span text:style-name="T1">The sound desk and CD/DVD player racks are not currently controlled by the system, and are powered on and off using the power switch on top of the DVD player.</text:span></text:p>
      <text:p text:style-name="P3"><text:span text:style-name="T1">You can return to the main screen at any time by pressing Back. This will not interrupt a power-up or power-down.</text:span></text:p>
      <text:h text:style-name="Heading_20_1" text:outline-level="1"><text:bookmark-start text:name="__RefHeading__216_644531775"/><text:span text:style-name="T1">System Log</text:span><text:bookmark-end text:name="__RefHeading__216_644531775"/></text:h>
      <text:p text:style-name="P3"><text:span text:style-name="T1">The system log of the controller is viewable by pressing the Log button in the bottom toolbar. This gives technical details from the controller computer. Only the last 100 log entries are kept. This feature is intended for troubleshooting purposes.</text:span></text:p>
      <text:p text:style-name="P3"><draw:frame draw:style-name="fr3" draw:name="Frame4" text:anchor-type="paragraph" svg:width="17cm" draw:z-index="6"><draw:text-box fo:min-height="10.349cm"><text:p text:style-name="Image"><draw:frame draw:style-name="fr4" draw:name="graphics4" text:anchor-type="paragraph" svg:x="0.004cm" svg:y="0.002cm" svg:width="17cm" style:rel-width="100%" svg:height="10.349cm" style:rel-height="scale" draw:z-index="7"><draw:image xlink:href="Pictures/100000000000040000000258FDC09AC9.png" xlink:type="simple" xlink:show="embed" xlink:actuate="onLoad"/></draw:frame>Image <text:sequence text:ref-name="refImage3" text:name="Image" text:formula="ooow:Image+1" style:num-format="1">4</text:sequence>: System log screen</text:p></draw:text-box></draw:frame><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resiasScreenfont" svg:font-family="TiresiasScreenfont" style:font-pitch="variable"/>
    <style:font-face style:name="TiresiasScreenfont1" svg:font-family="TiresiasScreenfont" style:font-adornments="Bold" style:font-pitch="variable"/>
    <style:font-face style:name="TiresiasScreenfont3" svg:font-family="TiresiasScreenfont" style:font-adornments="Italic" style:font-pitch="variable"/>
    <style:font-face style:name="TiresiasScreenfont2" svg:font-family="TiresiasScreenfont"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style:font-name="TiresiasScreenfont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text-properties style:font-name="TiresiasScreenfont2"/>
    </style:style>
    <style:style style:name="Image" style:family="paragraph" style:parent-style-name="Caption"/>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text-properties style:font-name="TiresiasScreenfont3" fo:font-style="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TiresiasScreenfon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number:number-style style:name="N0">
      <number:number number:min-integer-digits="1"/>
    </number:number-style>
  </office:automatic-styles>
  <office:master-styles>
    <style:master-page style:name="Standard" style:page-layout-name="Mpm1">
      <style:footer>
        <text:p text:style-name="MP1">AldatesX User Guide<text:tab/>v<text:variable-get text:name="version" style:data-style-name="N0">0.3</text:variable-get><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Muscat</meta:initial-creator>
    <meta:creation-date>2013-04-08T00:49:14</meta:creation-date>
    <dc:date>2013-04-08T01:46:03</dc:date>
    <dc:creator>James Muscat</dc:creator>
    <meta:editing-duration>PT40M48S</meta:editing-duration>
    <meta:editing-cycles>4</meta:editing-cycles>
    <meta:generator>LibreOffice/3.5$Linux_X86_64 LibreOffice_project/350m1$Build-2</meta:generator>
    <meta:document-statistic meta:table-count="0" meta:image-count="4" meta:object-count="0" meta:page-count="5" meta:paragraph-count="44" meta:word-count="911" meta:character-count="5206" meta:non-whitespace-character-count="4338"/>
  </office:meta>
</office:document-meta>
</file>